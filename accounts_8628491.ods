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8075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ounts_862849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5" table:default-cell-style-name="Default"/>
        <table:table-row table:style-name="ro1"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TotalDiode</text:p>
          </table:table-cell>
          <table:table-cell table:style-name="ce10" office:value-type="string" calcext:value-type="string">
            <text:p>BalanceWei</text:p>
          </table:table-cell>
          <table:table-cell table:style-name="ce10" office:value-type="string" calcext:value-type="string">
            <text:p>MinerStakedWei</text:p>
          </table:table-cell>
          <table:table-cell table:style-name="ce10" office:value-type="string" calcext:value-type="string">
            <text:p>MinerUnstakedWei</text:p>
          </table:table-cell>
          <table:table-cell table:style-name="ce10" office:value-type="string" calcext:value-type="string">
            <text:p>ContractStakedWei</text:p>
          </table:table-cell>
          <table:table-cell table:style-name="ce10" office:value-type="string" calcext:value-type="string">
            <text:p>ContractUnstakedWei</text:p>
          </table:table-cell>
          <table:table-cell table:style-name="ce10" table:number-columns-repeated="16375"/>
        </table:table-row>
        <table:table-row table:style-name="ro1">
          <table:table-cell office:value-type="string" calcext:value-type="string">
            <text:p>0xceca2f8cf1983b4cf0c1ba51fd382c2bc37aba58</text:p>
          </table:table-cell>
          <table:table-cell office:value-type="string" calcext:value-type="string">
            <text:p>US1</text:p>
          </table:table-cell>
          <table:table-cell office:value-type="string" calcext:value-type="string">
            <text:p>Foundation</text:p>
          </table:table-cell>
          <table:table-cell office:value-type="float" office:value="2531994" calcext:value-type="float">
            <text:p>2531994</text:p>
          </table:table-cell>
          <table:table-cell office:value-type="float" office:value="0" calcext:value-type="float">
            <text:p>0</text:p>
          </table:table-cell>
          <table:table-cell office:value-type="float" office:value="1.51994325681374E+023" calcext:value-type="float">
            <text:p>1.51994325681374E+023</text:p>
          </table:table-cell>
          <table:table-cell office:value-type="float" office:value="2.38E+024" calcext:value-type="float">
            <text:p>2.38E+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79856ddbac41d247eacd5576a53d16965c86f7e3</text:p>
          </table:table-cell>
          <table:table-cell table:number-columns-repeated="2" office:value-type="string" calcext:value-type="string">
            <text:p>Corp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2.4E+024" calcext:value-type="float">
            <text:p>2.4E+0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937c492a77ae90de971986d003ffbc5f8bb2232c</text:p>
          </table:table-cell>
          <table:table-cell office:value-type="string" calcext:value-type="string">
            <text:p>EU1</text:p>
          </table:table-cell>
          <table:table-cell office:value-type="string" calcext:value-type="string">
            <text:p>Foundation</text:p>
          </table:table-cell>
          <table:table-cell office:value-type="float" office:value="2184795" calcext:value-type="float">
            <text:p>2184795</text:p>
          </table:table-cell>
          <table:table-cell office:value-type="float" office:value="0" calcext:value-type="float">
            <text:p>0</text:p>
          </table:table-cell>
          <table:table-cell office:value-type="float" office:value="1.34795625700098E+023" calcext:value-type="float">
            <text:p>1.34795625700098E+023</text:p>
          </table:table-cell>
          <table:table-cell office:value-type="float" office:value="2.05E+024" calcext:value-type="float">
            <text:p>2.05E+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68e0bafdda9ef323f692fc080d612718c941d120</text:p>
          </table:table-cell>
          <table:table-cell office:value-type="string" calcext:value-type="string">
            <text:p>AS1</text:p>
          </table:table-cell>
          <table:table-cell office:value-type="string" calcext:value-type="string">
            <text:p>Foundation</text:p>
          </table:table-cell>
          <table:table-cell office:value-type="float" office:value="2180739" calcext:value-type="float">
            <text:p>2180739</text:p>
          </table:table-cell>
          <table:table-cell office:value-type="float" office:value="0" calcext:value-type="float">
            <text:p>0</text:p>
          </table:table-cell>
          <table:table-cell office:value-type="float" office:value="2.18073912507937E+024" calcext:value-type="float">
            <text:p>2.18073912507937E+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1000000000000000000000000000000000000000</text:p>
          </table:table-cell>
          <table:table-cell office:value-type="string" calcext:value-type="string">
            <text:p>Multisig</text:p>
          </table:table-cell>
          <table:table-cell office:value-type="string" calcext:value-type="string">
            <text:p>Foundation</text:p>
          </table:table-cell>
          <table:table-cell office:value-type="float" office:value="848451" calcext:value-type="float">
            <text:p>848451</text:p>
          </table:table-cell>
          <table:table-cell office:value-type="float" office:value="8.48451147677474E+023" calcext:value-type="float">
            <text:p>8.48451147677474E+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a904b00afb660093b8febedcb95137edb08185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543519" calcext:value-type="float">
            <text:p>543519</text:p>
          </table:table-cell>
          <table:table-cell office:value-type="float" office:value="5.43519E+023" calcext:value-type="float">
            <text:p>5.43519E+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9c8ebd0daede67245f6f71c74f28174842ea78be</text:p>
          </table:table-cell>
          <table:table-cell table:number-columns-repeated="2" office:value-type="string" calcext:value-type="string">
            <text:p>EarlyTeam</text:p>
          </table:table-cell>
          <table:table-cell office:value-type="float" office:value="464400" calcext:value-type="float">
            <text:p>464400</text:p>
          </table:table-cell>
          <table:table-cell office:value-type="float" office:value="4.644E+023" calcext:value-type="float">
            <text:p>4.644E+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21c9db5964a9884a2e5fcff1f959522d66f04089</text:p>
          </table:table-cell>
          <table:table-cell table:number-columns-repeated="2" office:value-type="string" calcext:value-type="string">
            <text:p>EarlyTeam</text:p>
          </table:table-cell>
          <table:table-cell office:value-type="float" office:value="464400" calcext:value-type="float">
            <text:p>464400</text:p>
          </table:table-cell>
          <table:table-cell office:value-type="float" office:value="4.644E+023" calcext:value-type="float">
            <text:p>4.644E+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295cbb9d3c13ab45a1586d7f9788e1cf87b9d036</text:p>
          </table:table-cell>
          <table:table-cell table:number-columns-repeated="2" office:value-type="string" calcext:value-type="string">
            <text:p>EarlyTeam</text:p>
          </table:table-cell>
          <table:table-cell office:value-type="float" office:value="232200" calcext:value-type="float">
            <text:p>232200</text:p>
          </table:table-cell>
          <table:table-cell office:value-type="float" office:value="2.322E+023" calcext:value-type="float">
            <text:p>2.322E+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fec19fa3501be5244af6ce096a1ea384271aa5d3</text:p>
          </table:table-cell>
          <table:table-cell table:number-columns-repeated="2" office:value-type="string" calcext:value-type="string">
            <text:p>EarlyTeam</text:p>
          </table:table-cell>
          <table:table-cell office:value-type="float" office:value="232200" calcext:value-type="float">
            <text:p>232200</text:p>
          </table:table-cell>
          <table:table-cell office:value-type="float" office:value="2.322E+023" calcext:value-type="float">
            <text:p>2.322E+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2c303a315a1ee4c377e28121baf30146e229731b</text:p>
          </table:table-cell>
          <table:table-cell office:value-type="string" calcext:value-type="string">
            <text:p>MoonbeamBridge</text:p>
          </table:table-cell>
          <table:table-cell office:value-type="string" calcext:value-type="string">
            <text:p>Community</text:p>
          </table:table-cell>
          <table:table-cell office:value-type="float" office:value="196606" calcext:value-type="float">
            <text:p>196606</text:p>
          </table:table-cell>
          <table:table-cell office:value-type="float" office:value="1.966062E+023" calcext:value-type="float">
            <text:p>1.966062E+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ae699211c62156b8f29ce17be47d2f069a27f2a6</text:p>
          </table:table-cell>
          <table:table-cell office:value-type="string" calcext:value-type="string">
            <text:p>EU2</text:p>
          </table:table-cell>
          <table:table-cell office:value-type="string" calcext:value-type="string">
            <text:p>Foundation</text:p>
          </table:table-cell>
          <table:table-cell office:value-type="float" office:value="179008" calcext:value-type="float">
            <text:p>179008</text:p>
          </table:table-cell>
          <table:table-cell office:value-type="float" office:value="0" calcext:value-type="float">
            <text:p>0</text:p>
          </table:table-cell>
          <table:table-cell office:value-type="float" office:value="1.79008424E+023" calcext:value-type="float">
            <text:p>1.79008424E+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f1477ef2f73d14b8aa412bd6b5cb8e96b4b70aa6</text:p>
          </table:table-cell>
          <table:table-cell table:number-columns-repeated="2" office:value-type="string" calcext:value-type="string">
            <text:p>EarlyTeam</text:p>
          </table:table-cell>
          <table:table-cell office:value-type="float" office:value="116100" calcext:value-type="float">
            <text:p>116100</text:p>
          </table:table-cell>
          <table:table-cell office:value-type="float" office:value="1.161E+023" calcext:value-type="float">
            <text:p>1.161E+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7e4cd38d266902444dc9c8f7c0aa716a32497d0b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Foundation</text:p>
          </table:table-cell>
          <table:table-cell office:value-type="float" office:value="113322" calcext:value-type="float">
            <text:p>113322</text:p>
          </table:table-cell>
          <table:table-cell office:value-type="float" office:value="0" calcext:value-type="float">
            <text:p>0</text:p>
          </table:table-cell>
          <table:table-cell office:value-type="float" office:value="1.13322624E+023" calcext:value-type="float">
            <text:p>1.13322624E+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1350d3b501d6842ed881b59de4b95b27372bfae8</text:p>
          </table:table-cell>
          <table:table-cell office:value-type="string" calcext:value-type="string">
            <text:p>AS2</text:p>
          </table:table-cell>
          <table:table-cell office:value-type="string" calcext:value-type="string">
            <text:p>Foundation</text:p>
          </table:table-cell>
          <table:table-cell office:value-type="float" office:value="112558" calcext:value-type="float">
            <text:p>112558</text:p>
          </table:table-cell>
          <table:table-cell office:value-type="float" office:value="0" calcext:value-type="float">
            <text:p>0</text:p>
          </table:table-cell>
          <table:table-cell office:value-type="float" office:value="1.12558624E+023" calcext:value-type="float">
            <text:p>1.12558624E+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96cde043e986040cb13ffafd80eb8ceac196fb84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Foundatio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E+023" calcext:value-type="float">
            <text:p>1E+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58cc80f5526594f07f33fd4be4aef153bab602b2</text:p>
          </table:table-cell>
          <table:table-cell office:value-type="string" calcext:value-type="string">
            <text:p>Faucet_4</text:p>
          </table:table-cell>
          <table:table-cell office:value-type="string" calcext:value-type="string">
            <text:p>Foundation</text:p>
          </table:table-cell>
          <table:table-cell office:value-type="float" office:value="99650" calcext:value-type="float">
            <text:p>99650</text:p>
          </table:table-cell>
          <table:table-cell office:value-type="float" office:value="9.965E+022" calcext:value-type="float">
            <text:p>9.965E+0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df9e8543750312d6194675ae79b56e996b1bee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97528" calcext:value-type="float">
            <text:p>97528</text:p>
          </table:table-cell>
          <table:table-cell office:value-type="float" office:value="9.75287268827427E+022" calcext:value-type="float">
            <text:p>9.75287268827427E+0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45aa0730cf4216f7195fc1f5903a171a1faa5209</text:p>
          </table:table-cell>
          <table:table-cell office:value-type="string" calcext:value-type="string">
            <text:p>Faucet_5</text:p>
          </table:table-cell>
          <table:table-cell office:value-type="string" calcext:value-type="string">
            <text:p>Foundation</text:p>
          </table:table-cell>
          <table:table-cell office:value-type="float" office:value="89797" calcext:value-type="float">
            <text:p>89797</text:p>
          </table:table-cell>
          <table:table-cell office:value-type="float" office:value="8.97978E+022" calcext:value-type="float">
            <text:p>8.97978E+0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aac3c78182b75a5b418fafd972349493605b62c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80811" calcext:value-type="float">
            <text:p>80811</text:p>
          </table:table-cell>
          <table:table-cell office:value-type="float" office:value="2.99E+022" calcext:value-type="float">
            <text:p>2.99E+022</text:p>
          </table:table-cell>
          <table:table-cell office:value-type="float" office:value="3.01E+017" calcext:value-type="float">
            <text:p>3.01E+017</text:p>
          </table:table-cell>
          <table:table-cell office:value-type="float" office:value="5.0911E+022" calcext:value-type="float">
            <text:p>5.0911E+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c0c416b326133d74335e6828d558efe315bd597e</text:p>
          </table:table-cell>
          <table:table-cell office:value-type="string" calcext:value-type="string">
            <text:p>Faucet_3</text:p>
          </table:table-cell>
          <table:table-cell office:value-type="string" calcext:value-type="string">
            <text:p>Foundation</text:p>
          </table:table-cell>
          <table:table-cell office:value-type="float" office:value="73499" calcext:value-type="float">
            <text:p>73499</text:p>
          </table:table-cell>
          <table:table-cell office:value-type="float" office:value="7.3499594979E+022" calcext:value-type="float">
            <text:p>7.3499594979E+0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6584f6223e977dc3c7779e6a1fdee14d376f48c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60656" calcext:value-type="float">
            <text:p>60656</text:p>
          </table:table-cell>
          <table:table-cell office:value-type="float" office:value="1.06440705132809E+022" calcext:value-type="float">
            <text:p>1.06440705132809E+022</text:p>
          </table:table-cell>
          <table:table-cell office:value-type="float" office:value="2.24E+017" calcext:value-type="float">
            <text:p>2.24E+017</text:p>
          </table:table-cell>
          <table:table-cell office:value-type="float" office:value="5.0012E+022" calcext:value-type="float">
            <text:p>5.0012E+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fabd0711d94285bb2ccb5957cde425b8b9e5b8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49786" calcext:value-type="float">
            <text:p>49786</text:p>
          </table:table-cell>
          <table:table-cell office:value-type="float" office:value="4.97866195524835E+022" calcext:value-type="float">
            <text:p>4.97866195524835E+0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8107a72b08309bba63dffcd6a6f531b1450c29a0</text:p>
          </table:table-cell>
          <table:table-cell table:number-columns-repeated="2" office:value-type="string" calcext:value-type="string">
            <text:p>EarlyTeam</text:p>
          </table:table-cell>
          <table:table-cell office:value-type="float" office:value="49437" calcext:value-type="float">
            <text:p>49437</text:p>
          </table:table-cell>
          <table:table-cell office:value-type="float" office:value="4.94371024884259E+022" calcext:value-type="float">
            <text:p>4.94371024884259E+0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487b320c744b86ce66231bd152026a53286194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45665" calcext:value-type="float">
            <text:p>45665</text:p>
          </table:table-cell>
          <table:table-cell office:value-type="float" office:value="0" calcext:value-type="float">
            <text:p>0</text:p>
          </table:table-cell>
          <table:table-cell office:value-type="float" office:value="8.04E+017" calcext:value-type="float">
            <text:p>8.04E+017</text:p>
          </table:table-cell>
          <table:table-cell office:value-type="float" office:value="4.5665E+022" calcext:value-type="float">
            <text:p>4.5665E+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26b2cf91307b7b13945f6c7c74953fa89e20f8f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6040" calcext:value-type="float">
            <text:p>26040</text:p>
          </table:table-cell>
          <table:table-cell office:value-type="float" office:value="0" calcext:value-type="float">
            <text:p>0</text:p>
          </table:table-cell>
          <table:table-cell office:value-type="float" office:value="2.6040524E+022" calcext:value-type="float">
            <text:p>2.6040524E+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eb6c9c1c90d9cd765f758c507a2e670afe0daa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11926" calcext:value-type="float">
            <text:p>11926</text:p>
          </table:table-cell>
          <table:table-cell office:value-type="float" office:value="0" calcext:value-type="float">
            <text:p>0</text:p>
          </table:table-cell>
          <table:table-cell office:value-type="float" office:value="4E+017" calcext:value-type="float">
            <text:p>4E+017</text:p>
          </table:table-cell>
          <table:table-cell office:value-type="float" office:value="1.1926E+022" calcext:value-type="float">
            <text:p>1.1926E+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e47e831b486e15ab7ecaa8d5f83fecac60ee7b1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11174" calcext:value-type="float">
            <text:p>11174</text:p>
          </table:table-cell>
          <table:table-cell office:value-type="float" office:value="0" calcext:value-type="float">
            <text:p>0</text:p>
          </table:table-cell>
          <table:table-cell office:value-type="float" office:value="6.24E+017" calcext:value-type="float">
            <text:p>6.24E+017</text:p>
          </table:table-cell>
          <table:table-cell office:value-type="float" office:value="1.1174E+022" calcext:value-type="float">
            <text:p>1.1174E+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ee399a6b8dd5eb0839ec140342ec6b2b000b267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.32E+017" calcext:value-type="float">
            <text:p>5.32E+017</text:p>
          </table:table-cell>
          <table:table-cell office:value-type="float" office:value="1.05E+022" calcext:value-type="float">
            <text:p>1.05E+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a5c996dc88d2503750684cebc8f353d2332f228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4019" calcext:value-type="float">
            <text:p>4019</text:p>
          </table:table-cell>
          <table:table-cell office:value-type="float" office:value="4.01958305149301E+021" calcext:value-type="float">
            <text:p>4.01958305149301E+0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6c7ce48ce53e5d29a85b2b0da98130ceaee6e5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9.91024E+020" calcext:value-type="float">
            <text:p>9.91024E+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d8935e14214e7b4b9380a6b17a7e81dc4d65c0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.33024E+020" calcext:value-type="float">
            <text:p>6.33024E+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c73436a8c664d8ed92d96558fd9aead70fa36cd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.91224E+020" calcext:value-type="float">
            <text:p>2.91224E+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176b4318e608cdfb579bacc94301b098707e872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.77024E+020" calcext:value-type="float">
            <text:p>2.77024E+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37af90bb63b1ad96f0dfd90c58c39776d65f10c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4.24E+017" calcext:value-type="float">
            <text:p>4.24E+017</text:p>
          </table:table-cell>
          <table:table-cell office:value-type="float" office:value="2.2E+020" calcext:value-type="float">
            <text:p>2.2E+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e6ec932fa562add102fa94282d7399180405d35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.04024E+020" calcext:value-type="float">
            <text:p>1.04024E+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ec0b3a92059b13338136bc93ae36f2c7eb2b6d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.03024E+020" calcext:value-type="float">
            <text:p>1.03024E+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7117d4d28285652a5c6f26a346005a504cb42cb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.0024E+019" calcext:value-type="float">
            <text:p>8.0024E+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2fc7a6208ab10cdea5dc9f9c51bb73a07a5c362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.2002E+019" calcext:value-type="float">
            <text:p>5.2002E+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5562103d96f13ad392e820e3e63930567dd02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50" calcext:value-type="float">
            <text:p>50</text:p>
          </table:table-cell>
          <table:table-cell office:value-type="float" office:value="5E+019" calcext:value-type="float">
            <text:p>5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c6893611780196c734827b4182f4570537df963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50" calcext:value-type="float">
            <text:p>50</text:p>
          </table:table-cell>
          <table:table-cell office:value-type="float" office:value="5E+019" calcext:value-type="float">
            <text:p>5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9b2d6e2d5ef25c0454abaa392fcd9796e05567c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50" calcext:value-type="float">
            <text:p>50</text:p>
          </table:table-cell>
          <table:table-cell office:value-type="float" office:value="5E+019" calcext:value-type="float">
            <text:p>5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34fb67fe1f46195122fe87136c9e7871397bdc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50" calcext:value-type="float">
            <text:p>50</text:p>
          </table:table-cell>
          <table:table-cell office:value-type="float" office:value="5E+019" calcext:value-type="float">
            <text:p>5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7c1376f393fe99c2afbfbeddb6e9151b1df2dde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50" calcext:value-type="float">
            <text:p>50</text:p>
          </table:table-cell>
          <table:table-cell office:value-type="float" office:value="5E+019" calcext:value-type="float">
            <text:p>5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5d79f40ba9943b85be092c11dbb5fae0118361d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2024E+019" calcext:value-type="float">
            <text:p>4.2024E+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3bfaeaa005aad327ca649dee9832079975caf96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1024E+019" calcext:value-type="float">
            <text:p>2.1024E+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521855f0a13cf68581abb4d0d1857b2ba574030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1" calcext:value-type="float">
            <text:p>21</text:p>
          </table:table-cell>
          <table:table-cell office:value-type="float" office:value="2.1E+019" calcext:value-type="float">
            <text:p>2.1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8a28528914f2fc11b357c319fc0e390b0817c5a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0" calcext:value-type="float">
            <text:p>20</text:p>
          </table:table-cell>
          <table:table-cell office:value-type="float" office:value="2E+019" calcext:value-type="float">
            <text:p>2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c6904c09020af020c0e32bb1ee7b97b64b1802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0" calcext:value-type="float">
            <text:p>20</text:p>
          </table:table-cell>
          <table:table-cell office:value-type="float" office:value="2E+019" calcext:value-type="float">
            <text:p>2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4b397650a0d2fdaaf34e957aa4a88bf0de0922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0" calcext:value-type="float">
            <text:p>20</text:p>
          </table:table-cell>
          <table:table-cell office:value-type="float" office:value="2E+019" calcext:value-type="float">
            <text:p>2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46659bb263fd831e3e1383e7acb6c37b622b29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0" calcext:value-type="float">
            <text:p>20</text:p>
          </table:table-cell>
          <table:table-cell office:value-type="float" office:value="2E+019" calcext:value-type="float">
            <text:p>2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e888d6a7aafee9e221100402811f07aea84176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0" calcext:value-type="float">
            <text:p>20</text:p>
          </table:table-cell>
          <table:table-cell office:value-type="float" office:value="2E+019" calcext:value-type="float">
            <text:p>2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cc9e059bff58a6bbe4b34c81e7f3416af91091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0" calcext:value-type="float">
            <text:p>20</text:p>
          </table:table-cell>
          <table:table-cell office:value-type="float" office:value="2E+019" calcext:value-type="float">
            <text:p>2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223ded7c95b41bf02ede3dc578f6b186a6236bd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19" calcext:value-type="float">
            <text:p>19</text:p>
          </table:table-cell>
          <table:table-cell office:value-type="float" office:value="1.9998341E+019" calcext:value-type="float">
            <text:p>1.9998341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540b14e4bd871cfe59e48d19254328b5ff11d82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19" calcext:value-type="float">
            <text:p>19</text:p>
          </table:table-cell>
          <table:table-cell office:value-type="float" office:value="1.9E+019" calcext:value-type="float">
            <text:p>1.9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ef1b64167d31dce96a6fdc9073a9da2c542f71f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19" calcext:value-type="float">
            <text:p>19</text:p>
          </table:table-cell>
          <table:table-cell office:value-type="float" office:value="1.9E+019" calcext:value-type="float">
            <text:p>1.9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efbb6a0100e7df2f6e668f2f9e6551ece12b6f01</text:p>
          </table:table-cell>
          <table:table-cell office:value-type="string" calcext:value-type="string">
            <text:p>AS3</text:p>
          </table:table-cell>
          <table:table-cell office:value-type="string" calcext:value-type="string">
            <text:p>Foundatio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6024E+019" calcext:value-type="float">
            <text:p>1.6024E+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fe298309063b9630bbc2a29223d9020ac53c5b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4024E+019" calcext:value-type="float">
            <text:p>1.4024E+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17d6c91c6ea12b9adc23555fc1f59f558c2bcb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10" calcext:value-type="float">
            <text:p>10</text:p>
          </table:table-cell>
          <table:table-cell office:value-type="float" office:value="1E+019" calcext:value-type="float">
            <text:p>1E+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d345b5277013ba6d26e9a2375e4f8025804ed1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.024E+018" calcext:value-type="float">
            <text:p>7.024E+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e951069fe4670284f12ca255bea7cd5d1be5f17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28E+018" calcext:value-type="float">
            <text:p>4.128E+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13ac4c74416ed3f59bd9d7dfca7932681963109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2.30101352E+018" calcext:value-type="float">
            <text:p>2.30101352E+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4d6b5ccfee83ffa40f94c30c73782c92b93d90d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24E+018" calcext:value-type="float">
            <text:p>2.024E+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72359f2f91b0617f16214479b2d501664a67dc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1E+018" calcext:value-type="float">
            <text:p>1E+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1cfcbce4effa7c774e54b9355b916615a4ae7f2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9.9770964E+017" calcext:value-type="float">
            <text:p>9.9770964E+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e93fd027f8549902907403afac9889b0ac55566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8E+017" calcext:value-type="float">
            <text:p>8E+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77472b02032a0fd557174a4fdec84eb57a9b537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E+017" calcext:value-type="float">
            <text:p>2.56E+0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d0a18c8872d6d638ec0fd2540677de6085d0e05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9.98698E+016" calcext:value-type="float">
            <text:p>9.98698E+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5c10d6168ef0c407d0932215a9b67f9afef919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8.8173E+016" calcext:value-type="float">
            <text:p>8.8173E+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79048ccc12447be3525c76336e13588ce8b4288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5.1E+016" calcext:value-type="float">
            <text:p>5.1E+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4b12cbaadad22c8e35b8572c3633a2d62aee616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4E+016" calcext:value-type="float">
            <text:p>4E+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eaa6ae2143df7310f6e5f3b26dafacc19a5163f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1E+016" calcext:value-type="float">
            <text:p>1E+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694249c2693084d86b4069029c0c14933b90b23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1E+016" calcext:value-type="float">
            <text:p>1E+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065b02462eb6af323a481ea2c1776607bc326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00000000000" calcext:value-type="float">
            <text:p>20000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29c094c943b8c2afec541069dc6476b6778cd86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00000000000" calcext:value-type="float">
            <text:p>20000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50eed3509a1e265f26bc9a60ff66cf9d2df60ea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00000000000" calcext:value-type="float">
            <text:p>20000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e36154e1cbca953d55028819c6971df7938fc5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0000000000" calcext:value-type="float">
            <text:p>10000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e5d636dbc4404312456b3f7f490fce0570f231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1000000000000000" calcext:value-type="float">
            <text:p>100000000000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a67d6e29b10bc46377721a84ad29637224df775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0000000000" calcext:value-type="float">
            <text:p>10000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73571f12ed117ddfb91be99529ed88d91514367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0000000000" calcext:value-type="float">
            <text:p>10000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58c486c1360f27fb119d6832beea1ee92f3de5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1000000000000000" calcext:value-type="float">
            <text:p>100000000000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4353350a63a680b2799f7576612ef856f7d786e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0000000000" calcext:value-type="float">
            <text:p>10000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e5396b269897ed0a0c5c7c3830bd60c4e396ee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0000000000" calcext:value-type="float">
            <text:p>10000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23b517742a8c9eb9c0525347e16142d7b2d766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0000000000" calcext:value-type="float">
            <text:p>10000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4779ec7141d7fa753f337647577e6c4f03e952b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0000000000" calcext:value-type="float">
            <text:p>10000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1ba7623162aa0d21f4b9919387045dc2ad5d4cd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0000000000" calcext:value-type="float">
            <text:p>10000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fc51d7c8c894d87bd25816f3392c7af40c4a69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1000000000000000" calcext:value-type="float">
            <text:p>100000000000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00000000000000000000000000000000000001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mun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</table:table>
      <table:table table:name="Pivot Table" table:style-name="ta1">
        <table:shapes>
          <draw:frame draw:z-index="0" draw:style-name="gr1" draw:text-style-name="P1" svg:width="7.6969in" svg:height="4.0154in" svg:x="2.1791in" svg:y="0.1882in">
            <draw:object draw:notify-on-update-of-ranges="'Pivot Table'.A2:'Pivot Table'.A5 'Pivot Table'.B1:'Pivot Table'.B1 'Pivot Table'.B2:'Pivot Table'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3"/>
        <table:table-column table:style-name="co10" table:default-cell-style-name="ce17"/>
        <table:table-row table:style-name="ro1">
          <table:table-cell table:style-name="ce11" office:value-type="string" calcext:value-type="string">
            <text:p>Group</text:p>
          </table:table-cell>
          <table:table-cell table:style-name="ce15" office:value-type="string" calcext:value-type="string">
            <text:p>Sum - TotalDiode</text:p>
          </table:table-cell>
        </table:table-row>
        <table:table-row table:style-name="ro1">
          <table:table-cell table:style-name="ce12" office:value-type="string" calcext:value-type="string">
            <text:p>Community</text:p>
          </table:table-cell>
          <table:table-cell table:style-name="ce16" office:value-type="float" office:value="1141532" calcext:value-type="float">
            <text:p>1141532</text:p>
          </table:table-cell>
        </table:table-row>
        <table:table-row table:style-name="ro1">
          <table:table-cell office:value-type="string" calcext:value-type="string">
            <text:p>Corp</text:p>
          </table:table-cell>
          <table:table-cell office:value-type="float" office:value="2400000" calcext:value-type="float">
            <text:p>2400000</text:p>
          </table:table-cell>
        </table:table-row>
        <table:table-row table:style-name="ro1">
          <table:table-cell office:value-type="string" calcext:value-type="string">
            <text:p>EarlyTeam</text:p>
          </table:table-cell>
          <table:table-cell office:value-type="float" office:value="1558737" calcext:value-type="float">
            <text:p>1558737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table:style-name="ce18" office:value-type="float" office:value="8513829" calcext:value-type="float">
            <text:p>8513829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19" office:value-type="float" office:value="13614098" calcext:value-type="float">
            <text:p>13614098</text:p>
          </table:table-cell>
        </table:table-row>
      </table:table>
      <table:named-expressions/>
      <table:data-pilot-tables>
        <table:data-pilot-table table:name="DataPilot1" table:application-data="" table:target-range-address="'Pivot Table'.A1:'Pivot Table'.B6" table:buttons="'Pivot Table'.A1" table:show-filter-button="false" table:drill-down-on-double-click="false">
          <table:source-cell-range table:cell-range-address="accounts_8628491.C1:accounts_8628491.D89"/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Corp" table:display="true" table:show-details="true"/>
                <table:data-pilot-member table:name="EarlyTeam" table:display="true" table:show-details="true"/>
                <table:data-pilot-member table:name="Founda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otalDiod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42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80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220" table:display="true" table:show-details="true"/>
                <table:data-pilot-member table:name="277" table:display="true" table:show-details="true"/>
                <table:data-pilot-member table:name="291" table:display="true" table:show-details="true"/>
                <table:data-pilot-member table:name="633" table:display="true" table:show-details="true"/>
                <table:data-pilot-member table:name="99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23:21:59.7957673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4T23:27:17.246443680</dc:date>
    <dc:creator>Dominic Letz</dc:creator>
    <meta:editing-duration>PT42M5S</meta:editing-duration>
    <meta:editing-cycles>10</meta:editing-cycles>
    <meta:generator>LibreOffice/24.2.7.2$Linux_X86_64 LibreOffice_project/420$Build-2</meta:generator>
    <meta:document-statistic meta:table-count="2" meta:cell-count="81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51cm" svg:height="10.2cm" xlink:href=".." xlink:type="simple" chart:class="chart:circle" chart:style-name="ch1">
        <chart:legend chart:legend-position="end" svg:x="17.076cm" svg:y="4.054cm" style:legend-expansion="high" chart:style-name="ch2"/>
        <chart:plot-area chart:style-name="ch3" table:cell-range-address="'Pivot Table'.A1:'Pivot Table'.B5" chart:data-source-has-labels="both" svg:x="0.35cm" svg:y="0.35cm" svg:width="16.376cm" svg:height="9.5cm">
          <chart:coordinate-region svg:x="4.009cm" svg:y="0.819cm" svg:width="9.031cm" svg:height="9.031cm"/>
          <chart:axis chart:dimension="x" chart:name="primary-x" chart:style-name="ch4" chartooo:axis-type="auto">
            <chartooo:date-scale/>
            <chart:categories table:cell-range-address="'Pivot Table'.A2:'Pivot Table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'.B2:'Pivot Table'.B5" chart:label-cell-address="'Pivot Table'.B1:'Pivot Table'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TotalDiode</text:p>
                <draw:g>
                  <svg:desc>'Pivot Table'.B1:'Pivot Tabl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unity</text:p>
                <draw:g>
                  <svg:desc>'Pivot Table'.A2:'Pivot Table'.A5</svg:desc>
                </draw:g>
              </table:table-cell>
              <table:table-cell office:value-type="float" office:value="1141532">
                <text:p>1141532</text:p>
                <draw:g>
                  <svg:desc>'Pivot Table'.B2:'Pivot Table'.B5</svg:desc>
                </draw:g>
              </table:table-cell>
            </table:table-row>
            <table:table-row>
              <table:table-cell office:value-type="string">
                <text:p>Corp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EarlyTeam</text:p>
              </table:table-cell>
              <table:table-cell office:value-type="float" office:value="1558737">
                <text:p>1558737</text:p>
              </table:table-cell>
            </table:table-row>
            <table:table-row>
              <table:table-cell office:value-type="string">
                <text:p>Foundation</text:p>
              </table:table-cell>
              <table:table-cell office:value-type="float" office:value="8513829">
                <text:p>8513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